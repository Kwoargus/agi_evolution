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5.787cm" table:align="left"/>
    </style:style>
    <style:style style:name="Таблица1.A" style:family="table-column">
      <style:table-column-properties style:column-width="2.334cm"/>
    </style:style>
    <style:style style:name="Таблица1.B" style:family="table-column">
      <style:table-column-properties style:column-width="3.455cm"/>
    </style:style>
    <style:style style:name="Таблица1.C" style:family="table-column">
      <style:table-column-properties style:column-width="5.106cm"/>
    </style:style>
    <style:style style:name="Таблица1.D" style:family="table-column">
      <style:table-column-properties style:column-width="4.89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ВХОДНЫЕ СЕНСОРНЫЕ ДАННЫЕ</text:h>
      <text:h text:style-name="Heading_20_3" text:outline-level="3">1.1. Состав и формат</text:h>
      <text:p text:style-name="Text_20_body">В тесте <text:span text:style-name="Source_20_Text">test_emotion_system.py</text:span> использовались <text:span text:style-name="Strong_20_Emphasis">синтетические</text:span> сенсорные данные:</text:p>
      <text:p text:style-name="Text_20_body">python</text:p>
      <text:p text:style-name="Preformatted_20_Text">sensory_data = {</text:p>
      <text:p text:style-name="Preformatted_20_Text"><text:s text:c="4"/>'vision': np.random.randn(64), <text:s text:c="2"/># 64 случайных числа</text:p>
      <text:p text:style-name="Preformatted_20_Text"><text:s text:c="4"/>'sound': np.random.randn(32), <text:s text:c="3"/># 32 случайных числа</text:p>
      <text:p text:style-name="Preformatted_20_Text"><text:s text:c="4"/>'smell': np.random.randn(32), <text:s text:c="3"/># 32 случайных числа</text:p>
      <text:p text:style-name="Preformatted_20_Text"><text:s text:c="4"/>'context': {'situation': 'test'},</text:p>
      <text:p text:style-name="Preformatted_20_Text"><text:s text:c="4"/>'participants': ['agent', 'observer']</text:p>
      <text:p text:style-name="P1">}</text:p>
      <text:h text:style-name="Heading_20_3" text:outline-level="3">1.2. Откуда берутся реальные данные (в будущем)</text:h>
      <text:p text:style-name="Text_20_body">python</text:p>
      <text:p text:style-name="Preformatted_20_Text"># В реальном боте данные будут приходить от:</text:p>
      <text:p text:style-name="Preformatted_20_Text">class RealSensors:</text:p>
      <text:p text:style-name="Preformatted_20_Text"><text:s text:c="4"/>def capture(self):</text:p>
      <text:p text:style-name="Preformatted_20_Text"><text:s text:c="8"/>return {</text:p>
      <text:p text:style-name="Preformatted_20_Text"><text:s text:c="12"/>'vision': self.camera.get_embedding(), <text:s text:c="5"/># 128-dim от CNN</text:p>
      <text:p text:style-name="Preformatted_20_Text"><text:s text:c="12"/>'sound': self.microphone.get_embedding(), <text:s text:c="2"/># 128-dim от аудио-энкодера</text:p>
      <text:p text:style-name="Preformatted_20_Text"><text:s text:c="12"/>'smell': self.smell_sensor.get_embedding(), # 64-dim от газового сенсора</text:p>
      <text:p text:style-name="Preformatted_20_Text"><text:s text:c="12"/>'context': self.get_context(), <text:s text:c="13"/># Текущая ситуация</text:p>
      <text:p text:style-name="Preformatted_20_Text"><text:s text:c="12"/>'participants': self.detect_objects() <text:s text:c="6"/># Кто рядом</text:p>
      <text:p text:style-name="P1"><text:s text:c="8"/>}</text:p>
      <text:h text:style-name="Heading_20_3" text:outline-level="3">1.3. Как формируется эмбеддинг события</text:h>
      <text:p text:style-name="Text_20_body">В <text:span text:style-name="Source_20_Text">emotion_system.py</text:span> сенсорные данные преобразуются в единый эмбеддинг:</text:p>
      <text:p text:style-name="Text_20_body">python</text:p>
      <text:p text:style-name="Preformatted_20_Text">def _sensory_to_embedding(self, sensory_data: Dict) -&gt; np.ndarray:</text:p>
      <text:p text:style-name="Preformatted_20_Text"><text:s text:c="4"/>"""Преобразует сенсорные данные в единый вектор 128-dim."""</text:p>
      <text:p text:style-name="Preformatted_20_Text"><text:s text:c="4"/>embedding = np.zeros(128)</text:p>
      <text:p text:style-name="Preformatted_20_Text"><text:s text:c="4"/></text:p>
      <text:p text:style-name="Preformatted_20_Text"><text:s text:c="4"/># Vision (64 компонент)</text:p>
      <text:p text:style-name="Preformatted_20_Text"><text:s text:c="4"/>if 'vision' in sensory_data:</text:p>
      <text:p text:style-name="Preformatted_20_Text"><text:s text:c="8"/>vision = sensory_data['vision']</text:p>
      <text:p text:style-name="Preformatted_20_Text"><text:s text:c="8"/>embedding[:64] = vision[:64] <text:s/># Берем первые 64</text:p>
      <text:p text:style-name="Preformatted_20_Text"><text:s text:c="4"/></text:p>
      <text:p text:style-name="Preformatted_20_Text"><text:s text:c="4"/># Sound (32 компонент)</text:p>
      <text:p text:style-name="Preformatted_20_Text"><text:s text:c="4"/>if 'sound' in sensory_data:</text:p>
      <text:p text:style-name="Preformatted_20_Text"><text:s text:c="8"/>sound = sensory_data['sound']</text:p>
      <text:p text:style-name="Preformatted_20_Text"><text:s text:c="8"/>embedding[64:96] = sound[:32]</text:p>
      <text:p text:style-name="Preformatted_20_Text"><text:s text:c="4"/></text:p>
      <text:p text:style-name="Preformatted_20_Text"><text:s text:c="4"/># Smell (32 компонент)</text:p>
      <text:p text:style-name="Preformatted_20_Text"><text:s text:c="4"/>if 'smell' in sensory_data:</text:p>
      <text:p text:style-name="Preformatted_20_Text"><text:s text:c="8"/>smell = sensory_data['smell']</text:p>
      <text:p text:style-name="Preformatted_20_Text"><text:s text:c="8"/>embedding[96:128] = smell[:32]</text:p>
      <text:p text:style-name="Preformatted_20_Text"><text:s text:c="4"/></text:p>
      <text:p text:style-name="Preformatted_20_Text"><text:s text:c="4"/># Нормализация</text:p>
      <text:p text:style-name="Preformatted_20_Text"><text:s text:c="4"/>norm = np.linalg.norm(embedding) + 1e-8</text:p>
      <text:p text:style-name="P1"><text:soft-page-break/><text:s text:c="4"/>return embedding / norm</text:p>
      <text:p text:style-name="Text_20_body"><text:span text:style-name="Strong_20_Emphasis">Результат:</text:span> Единый <text:span text:style-name="Strong_20_Emphasis">128-мерный вектор</text:span>, представляющий всю сенсорную сцену.</text:p>
      <text:p text:style-name="Horizontal_20_Line"/>
      <text:h text:style-name="Heading_20_2" text:outline-level="2">2. АЛГОРИТМИЧЕСКИЙ МЕХАНИЗМ ГЕНЕРАЦИИ ЭМОЦИИ</text:h>
      <text:h text:style-name="Heading_20_3" text:outline-level="3">2.1. Общая схема</text:h>
      <text:p text:style-name="Text_20_body">text</text:p>
      <text:p text:style-name="Preformatted_20_Text">Сенсорные данные (128-dim)</text:p>
      <text:p text:style-name="Preformatted_20_Text"><text:s text:c="8"/>│</text:p>
      <text:p text:style-name="Preformatted_20_Text"><text:s text:c="8"/>▼</text:p>
      <text:p text:style-name="Preformatted_20_Text">┌───────────────────────────────────────────────────────┐</text:p>
      <text:p text:style-name="Preformatted_20_Text">│ 1. ПОИСК ПОХОЖИХ СОБЫТИЙ (косинусное сходство) <text:s text:c="5"/>│</text:p>
      <text:p text:style-name="Preformatted_20_Text">│ <text:s text:c="3"/>- Сравниваем с эмбеддингами всех событий в БД <text:s text:c="4"/>│</text:p>
      <text:p text:style-name="Preformatted_20_Text">│ <text:s text:c="3"/>- Берем top-5 самых похожих <text:s text:c="22"/>│</text:p>
      <text:p text:style-name="Preformatted_20_Text">└───────────────────────────────────────────────────────┘</text:p>
      <text:p text:style-name="Preformatted_20_Text"><text:s text:c="8"/>│</text:p>
      <text:p text:style-name="Preformatted_20_Text"><text:s text:c="8"/>▼</text:p>
      <text:p text:style-name="Preformatted_20_Text">┌───────────────────────────────────────────────────────┐</text:p>
      <text:p text:style-name="Preformatted_20_Text">│ 2. ПОИСК СВЯЗЕЙ: событие → эмоция <text:s text:c="19"/>│</text:p>
      <text:p text:style-name="Preformatted_20_Text">│ <text:s text:c="3"/>- Для каждого найденного события проверяем <text:s text:c="7"/>│</text:p>
      <text:p text:style-name="Preformatted_20_Text">│ <text:s text:c="5"/>связи в биграфе (event_to_emotion) <text:s text:c="13"/>│</text:p>
      <text:p text:style-name="Preformatted_20_Text">└───────────────────────────────────────────────────────┘</text:p>
      <text:p text:style-name="Preformatted_20_Text"><text:s text:c="8"/>│</text:p>
      <text:p text:style-name="Preformatted_20_Text"><text:s text:c="8"/>▼</text:p>
      <text:p text:style-name="Preformatted_20_Text">┌───────────────────────────────────────────────────────┐</text:p>
      <text:p text:style-name="Preformatted_20_Text">│ 3. ГЕНЕРАЦИЯ ЭМОЦИОНАЛЬНЫХ РЕАКЦИЙ <text:s text:c="18"/>│</text:p>
      <text:p text:style-name="Preformatted_20_Text">│ <text:s text:c="3"/>- Интенсивность = similarity * base_intensity <text:s text:c="4"/>│</text:p>
      <text:p text:style-name="Preformatted_20_Text">│ <text:s text:c="3"/>- Создаем объект EmotionalResponse <text:s text:c="15"/>│</text:p>
      <text:p text:style-name="Preformatted_20_Text">└───────────────────────────────────────────────────────┘</text:p>
      <text:p text:style-name="Preformatted_20_Text"><text:s text:c="8"/>│</text:p>
      <text:p text:style-name="Preformatted_20_Text"><text:s text:c="8"/>▼</text:p>
      <text:p text:style-name="Preformatted_20_Text">┌───────────────────────────────────────────────────────┐</text:p>
      <text:p text:style-name="Preformatted_20_Text">│ 4. ЕСЛИ НЕТ РЕАКЦИЙ → НЕЙТРАЛЬНАЯ (Trust 0.1) <text:s text:c="6"/>│</text:p>
      <text:p text:style-name="P1">└───────────────────────────────────────────────────────┘</text:p>
      <text:h text:style-name="Heading_20_3" text:outline-level="3">2.2. Детальный алгоритм (код из <text:span text:style-name="Source_20_Text">emotion_engine.py</text:span>)</text:h>
      <text:p text:style-name="Text_20_body">python</text:p>
      <text:p text:style-name="Preformatted_20_Text">def process_event(self, event: EmotionalEvent) -&gt; List[EmotionalResponse]:</text:p>
      <text:p text:style-name="Preformatted_20_Text"><text:s text:c="4"/>responses = []</text:p>
      <text:p text:style-name="Preformatted_20_Text"><text:s text:c="4"/></text:p>
      <text:p text:style-name="Preformatted_20_Text"><text:s text:c="4"/># ============================================================</text:p>
      <text:p text:style-name="Preformatted_20_Text"><text:s text:c="4"/># ШАГ 1: ПОИСК ПОХОЖИХ СОБЫТИЙ</text:p>
      <text:p text:style-name="Preformatted_20_Text"><text:s text:c="4"/># ============================================================</text:p>
      <text:p text:style-name="Preformatted_20_Text"><text:s text:c="4"/># Сравниваем эмбеддинг текущего события со всеми в базе</text:p>
      <text:p text:style-name="Preformatted_20_Text"><text:s text:c="4"/>similar_events = self.graph.get_similar_events(</text:p>
      <text:p text:style-name="Preformatted_20_Text"><text:s text:c="8"/>event.embedding, <text:s/># 128-dim вектор события</text:p>
      <text:p text:style-name="Preformatted_20_Text"><text:s text:c="8"/>top_k=5 <text:s text:c="10"/># Берем 5 самых похожих</text:p>
      <text:p text:style-name="Preformatted_20_Text"><text:s text:c="4"/>)</text:p>
      <text:p text:style-name="Preformatted_20_Text"><text:s text:c="4"/></text:p>
      <text:p text:style-name="Preformatted_20_Text"><text:s text:c="4"/># ============================================================</text:p>
      <text:p text:style-name="Preformatted_20_Text"><text:s text:c="4"/># ШАГ 2: ДЛЯ КАЖДОГО ПОХОЖЕГО СОБЫТИЯ</text:p>
      <text:p text:style-name="Preformatted_20_Text"><text:s text:c="4"/># ============================================================</text:p>
      <text:p text:style-name="Preformatted_20_Text"><text:soft-page-break/><text:s text:c="4"/>for event_id, similarity in similar_events:</text:p>
      <text:p text:style-name="Preformatted_20_Text"><text:s text:c="8"/># Порог схожести 0.5 (50%)</text:p>
      <text:p text:style-name="Preformatted_20_Text"><text:s text:c="8"/>if similarity &lt; 0.5:</text:p>
      <text:p text:style-name="Preformatted_20_Text"><text:s text:c="12"/>continue</text:p>
      <text:p text:style-name="Preformatted_20_Text"><text:s text:c="8"/></text:p>
      <text:p text:style-name="Preformatted_20_Text"><text:s text:c="8"/># ============================================================</text:p>
      <text:p text:style-name="Preformatted_20_Text"><text:s text:c="8"/># ШАГ 3: ИЩЕМ СВЯЗАННЫЕ ЭМОЦИИ В БИГРАФЕ</text:p>
      <text:p text:style-name="Preformatted_20_Text"><text:s text:c="8"/># ============================================================</text:p>
      <text:p text:style-name="Preformatted_20_Text"><text:s text:c="8"/># event_to_emotion - это граф связей событие → эмоция</text:p>
      <text:p text:style-name="Preformatted_20_Text"><text:s text:c="8"/>for emotion_type in self.graph.event_to_emotion.successors(event_id):</text:p>
      <text:p text:style-name="Preformatted_20_Text"><text:s text:c="12"/>emotion_data = self.graph.emotions.get(emotion_type)</text:p>
      <text:p text:style-name="Preformatted_20_Text"><text:s text:c="12"/></text:p>
      <text:p text:style-name="Preformatted_20_Text"><text:s text:c="12"/>if emotion_data:</text:p>
      <text:p text:style-name="Preformatted_20_Text"><text:s text:c="16"/># ============================================================</text:p>
      <text:p text:style-name="Preformatted_20_Text"><text:s text:c="16"/># ШАГ 4: ВЫЧИСЛЯЕМ ИНТЕНСИВНОСТЬ</text:p>
      <text:p text:style-name="Preformatted_20_Text"><text:s text:c="16"/># ============================================================</text:p>
      <text:p text:style-name="Preformatted_20_Text"><text:s text:c="16"/># Интенсивность = схожесть события × базовая интенсивность эмоции</text:p>
      <text:p text:style-name="Preformatted_20_Text"><text:s text:c="16"/>intensity = similarity * emotion_data.intensity</text:p>
      <text:p text:style-name="Preformatted_20_Text"><text:s text:c="16"/></text:p>
      <text:p text:style-name="Preformatted_20_Text"><text:s text:c="16"/># ============================================================</text:p>
      <text:p text:style-name="Preformatted_20_Text"><text:s text:c="16"/># ШАГ 5: СОЗДАЕМ ЭМОЦИОНАЛЬНУЮ РЕАКЦИЮ</text:p>
      <text:p text:style-name="Preformatted_20_Text"><text:s text:c="16"/># ============================================================</text:p>
      <text:p text:style-name="Preformatted_20_Text"><text:s text:c="16"/>response = EmotionalResponse(</text:p>
      <text:p text:style-name="Preformatted_20_Text"><text:s text:c="20"/>emotion_type=EmotionType(emotion_type),</text:p>
      <text:p text:style-name="Preformatted_20_Text"><text:s text:c="20"/>intensity=intensity, <text:s text:c="19"/># 0.0 - 1.0</text:p>
      <text:p text:style-name="Preformatted_20_Text"><text:s text:c="20"/>valence=emotion_data.valence, <text:s text:c="9"/># -1.0 до +1.0</text:p>
      <text:p text:style-name="Preformatted_20_Text"><text:s text:c="20"/>arousal=emotion_data.arousal, <text:s text:c="9"/># 0.0 до 1.0</text:p>
      <text:p text:style-name="Preformatted_20_Text"><text:s text:c="20"/>trigger_event_id=event_id,</text:p>
      <text:p text:style-name="Preformatted_20_Text"><text:s text:c="20"/>embedding=emotion_data.embedding * intensity</text:p>
      <text:p text:style-name="Preformatted_20_Text"><text:s text:c="16"/>)</text:p>
      <text:p text:style-name="Preformatted_20_Text"><text:s text:c="16"/>responses.append(response)</text:p>
      <text:p text:style-name="Preformatted_20_Text"><text:s text:c="4"/></text:p>
      <text:p text:style-name="Preformatted_20_Text"><text:s text:c="4"/># ============================================================</text:p>
      <text:p text:style-name="Preformatted_20_Text"><text:s text:c="4"/># ШАГ 6: НЕТ РЕАКЦИЙ → НЕЙТРАЛЬНАЯ</text:p>
      <text:p text:style-name="Preformatted_20_Text"><text:s text:c="4"/># ============================================================</text:p>
      <text:p text:style-name="Preformatted_20_Text"><text:s text:c="4"/>if not responses:</text:p>
      <text:p text:style-name="Preformatted_20_Text"><text:s text:c="8"/>neutral = EmotionalResponse(</text:p>
      <text:p text:style-name="Preformatted_20_Text"><text:s text:c="12"/>emotion_type=EmotionType.TRUST,</text:p>
      <text:p text:style-name="Preformatted_20_Text"><text:s text:c="12"/>intensity=0.1, <text:s text:c="9"/># Минимальная</text:p>
      <text:p text:style-name="Preformatted_20_Text"><text:s text:c="12"/>valence=0.0, <text:s text:c="11"/># Нейтральная</text:p>
      <text:p text:style-name="Preformatted_20_Text"><text:s text:c="12"/>arousal=0.0, <text:s text:c="11"/># Спокойная</text:p>
      <text:p text:style-name="Preformatted_20_Text"><text:s text:c="12"/>trigger_event_id=event.id,</text:p>
      <text:p text:style-name="Preformatted_20_Text"><text:s text:c="12"/>embedding=np.zeros(64)</text:p>
      <text:p text:style-name="Preformatted_20_Text"><text:s text:c="8"/>)</text:p>
      <text:p text:style-name="Preformatted_20_Text"><text:s text:c="8"/>responses.append(neutral)</text:p>
      <text:p text:style-name="Preformatted_20_Text"><text:s text:c="4"/></text:p>
      <text:p text:style-name="P1"><text:s text:c="4"/>return responses</text:p>
      <text:h text:style-name="Heading_20_3" text:outline-level="3">2.3. Что такое биграф и как он работает</text:h>
      <text:p text:style-name="Text_20_body">python</text:p>
      <text:p text:style-name="Preformatted_20_Text"># БИГРАФ = ДВА ГРАФА + СВЯЗИ МЕЖДУ НИМИ</text:p>
      <text:p text:style-name="Preformatted_20_Text"/>
      <text:p text:style-name="Preformatted_20_Text"># Граф 1: События (причинно-следственные связи)</text:p>
      <text:p text:style-name="Preformatted_20_Text"># event1 → event2 → event3</text:p>
      <text:p text:style-name="Preformatted_20_Text"/>
      <text:p text:style-name="Preformatted_20_Text"># Граф 2: Эмоции (порождение эмоций)</text:p>
      <text:p text:style-name="Preformatted_20_Text"># anger → resentment → hatred</text:p>
      <text:p text:style-name="Preformatted_20_Text"/>
      <text:p text:style-name="Preformatted_20_Text"># Связи между графами:</text:p>
      <text:p text:style-name="Preformatted_20_Text"># event1 → anger (событие вызывает гнев)</text:p>
      <text:p text:style-name="P1"><text:soft-page-break/># anger → event2 (гнев вызывает действие)</text:p>
      <text:p text:style-name="Text_20_body"><text:span text:style-name="Strong_20_Emphasis">Визуализация биграфа:</text:span></text:p>
      <text:p text:style-name="Text_20_body">text</text:p>
      <text:p text:style-name="Preformatted_20_Text"><text:s text:c="4"/>[event1] <text:s/>──→ <text:s/>[event2] <text:s/>──→ <text:s/>[event3]</text:p>
      <text:p text:style-name="Preformatted_20_Text"><text:s text:c="7"/>│ <text:s text:c="13"/>│ <text:s text:c="13"/>│</text:p>
      <text:p text:style-name="Preformatted_20_Text"><text:s text:c="7"/>▼ <text:s text:c="13"/>▼ <text:s text:c="13"/>▼</text:p>
      <text:p text:style-name="Preformatted_20_Text"><text:s text:c="4"/>[anger] <text:s/>──→ <text:s/>[resentment] ──→ [hatred]</text:p>
      <text:p text:style-name="Preformatted_20_Text"><text:s text:c="7"/>│ <text:s text:c="13"/>│ <text:s text:c="13"/>│</text:p>
      <text:p text:style-name="Preformatted_20_Text"><text:s text:c="7"/>▼ <text:s text:c="13"/>▼ <text:s text:c="13"/>▼</text:p>
      <text:p text:style-name="P1"><text:s text:c="4"/>[event4] <text:s/>──→ <text:s/>[event5] <text:s/>──→ <text:s/>[event6]</text:p>
      <text:h text:style-name="Heading_20_3" text:outline-level="3">2.4. Используется ли GAN и GA?</text:h>
      <text:p text:style-name="Text_20_body"><text:span text:style-name="Strong_20_Emphasis">В ТЕКУЩЕЙ РЕАЛИЗАЦИИ - НЕТ!</text:span></text:p>
      <text:p text:style-name="Text_20_body">Текущая реализация использует <text:span text:style-name="Strong_20_Emphasis">простой поиск по биграфу</text:span>:</text:p>
      <text:p text:style-name="Text_20_body">python</text:p>
      <text:p text:style-name="Preformatted_20_Text"># Простой поиск по биграфу (без GAN/GA)</text:p>
      <text:p text:style-name="Preformatted_20_Text">similar_events = find_similar_events(embedding)</text:p>
      <text:p text:style-name="Preformatted_20_Text">for event in similar_events:</text:p>
      <text:p text:style-name="Preformatted_20_Text"><text:s text:c="4"/>for emotion in event_to_emotion[event]:</text:p>
      <text:p text:style-name="P1"><text:s text:c="8"/>generate_response(emotion)</text:p>
      <text:p text:style-name="Text_20_body"><text:span text:style-name="Strong_20_Emphasis">ПЛАНИРУЕТСЯ</text:span> использовать GAN и GA для:</text:p>
      <text:list xml:id="list4051816426" text:style-name="L1">
        <text:list-item>
          <text:p text:style-name="P2"><text:span text:style-name="Strong_20_Emphasis">Генерации новых связей</text:span> между событиями и эмоциями (GAN)</text:p>
        </text:list-item>
        <text:list-item>
          <text:p text:style-name="P2"><text:span text:style-name="Strong_20_Emphasis">Эволюции эмоциональных реакций</text:span> (GA)</text:p>
        </text:list-item>
        <text:list-item>
          <text:p text:style-name="P2"><text:span text:style-name="Strong_20_Emphasis">Создания новых эмоциональных паттернов</text:span> (GAN + GA)</text:p>
        </text:list-item>
      </text:list>
      <text:p text:style-name="Horizontal_20_Line"/>
      <text:h text:style-name="Heading_20_2" text:outline-level="2">3. СРАВНЕНИЕ С РЕФЛЕКСАМИ И ИНСТИНКТАМИ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Table_20_Heading">Аспект</text:p>
            </table:table-cell>
            <table:table-cell table:style-name="Таблица1.A1" office:value-type="string">
              <text:p text:style-name="Table_20_Heading">Рефлексы</text:p>
            </table:table-cell>
            <table:table-cell table:style-name="Таблица1.A1" office:value-type="string">
              <text:p text:style-name="Table_20_Heading">Инстинкты</text:p>
            </table:table-cell>
            <table:table-cell table:style-name="Таблица1.A1" office:value-type="string">
              <text:p text:style-name="Table_20_Heading">Эмоции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trong_20_Emphasis">Вход</text:span></text:p>
          </table:table-cell>
          <table:table-cell table:style-name="Таблица1.A1" office:value-type="string">
            <text:p text:style-name="Table_20_Contents">Простые сигналы</text:p>
          </table:table-cell>
          <table:table-cell table:style-name="Таблица1.A1" office:value-type="string">
            <text:p text:style-name="Table_20_Contents">Мультимодальные векторы</text:p>
          </table:table-cell>
          <table:table-cell table:style-name="Таблица1.A1" office:value-type="string">
            <text:p text:style-name="Table_20_Contents">Комплексные события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Механизм</text:span></text:p>
          </table:table-cell>
          <table:table-cell table:style-name="Таблица1.A1" office:value-type="string">
            <text:p text:style-name="Table_20_Contents">Правила (если-то)</text:p>
          </table:table-cell>
          <table:table-cell table:style-name="Таблица1.A1" office:value-type="string">
            <text:p text:style-name="Table_20_Contents">GAN + GA</text:p>
          </table:table-cell>
          <table:table-cell table:style-name="Таблица1.A1" office:value-type="string">
            <text:p text:style-name="Table_20_Contents">Биграф + (GAN/GA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Сложность</text:span></text:p>
          </table:table-cell>
          <table:table-cell table:style-name="Таблица1.A1" office:value-type="string">
            <text:p text:style-name="Table_20_Contents">Низкая</text:p>
          </table:table-cell>
          <table:table-cell table:style-name="Таблица1.A1" office:value-type="string">
            <text:p text:style-name="Table_20_Contents">Средняя</text:p>
          </table:table-cell>
          <table:table-cell table:style-name="Таблица1.A1" office:value-type="string">
            <text:p text:style-name="Table_20_Contents">Высокая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Время</text:span></text:p>
          </table:table-cell>
          <table:table-cell table:style-name="Таблица1.A1" office:value-type="string">
            <text:p text:style-name="Table_20_Contents">Мгновенно</text:p>
          </table:table-cell>
          <table:table-cell table:style-name="Таблица1.A1" office:value-type="string">
            <text:p text:style-name="Table_20_Contents">Быстро</text:p>
          </table:table-cell>
          <table:table-cell table:style-name="Таблица1.A1" office:value-type="string">
            <text:p text:style-name="Table_20_Contents">Медленно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Обучение</text:span></text:p>
          </table:table-cell>
          <table:table-cell table:style-name="Таблица1.A1" office:value-type="string">
            <text:p text:style-name="Table_20_Contents">GA</text:p>
          </table:table-cell>
          <table:table-cell table:style-name="Таблица1.A1" office:value-type="string">
            <text:p text:style-name="Table_20_Contents">GAN + GA</text:p>
          </table:table-cell>
          <table:table-cell table:style-name="Таблица1.A1" office:value-type="string">
            <text:p text:style-name="Table_20_Contents">GAN + GA (планируется)</text:p>
          </table:table-cell>
        </table:table-row>
      </table:table>
      <text:p text:style-name="Horizontal_20_Line"/>
      <text:h text:style-name="Heading_20_2" text:outline-level="2">4. ЧТО НУЖНО ДЛЯ РЕАЛЬНОЙ РАБОТЫ</text:h>
      <text:h text:style-name="Heading_20_3" text:outline-level="3">4.1. Данные для обучения биграфа</text:h>
      <text:p text:style-name="Text_20_body">python</text:p>
      <text:p text:style-name="Preformatted_20_Text"># Примеры для обучения</text:p>
      <text:p text:style-name="Preformatted_20_Text">training_data = [</text:p>
      <text:p text:style-name="Preformatted_20_Text"><text:s text:c="4"/># Событие → Эмоция</text:p>
      <text:p text:style-name="Preformatted_20_Text"><text:soft-page-break/><text:s text:c="4"/>{'event': 'ученик получил 4', 'emotion': 'обида', 'intensity': 0.7},</text:p>
      <text:p text:style-name="Preformatted_20_Text"><text:s text:c="4"/>{'event': 'подарок на 8 марта', 'emotion': 'радость', 'intensity': 0.9},</text:p>
      <text:p text:style-name="Preformatted_20_Text"><text:s text:c="4"/></text:p>
      <text:p text:style-name="Preformatted_20_Text"><text:s text:c="4"/># Цепочки эмоций</text:p>
      <text:p text:style-name="Preformatted_20_Text"><text:s text:c="4"/>{'emotion1': 'обида', 'emotion2': 'ненависть', 'weight': 0.6},</text:p>
      <text:p text:style-name="Preformatted_20_Text"><text:s text:c="4"/>{'emotion1': 'радость', 'emotion2': 'любовь', 'weight': 0.8},</text:p>
      <text:p text:style-name="P1">]</text:p>
      <text:h text:style-name="Heading_20_3" text:outline-level="3">4.2. Обучение через GAN</text:h>
      <text:p text:style-name="Text_20_body">python</text:p>
      <text:p text:style-name="Preformatted_20_Text">class EmotionGAN:</text:p>
      <text:p text:style-name="Preformatted_20_Text"><text:s text:c="4"/>def train(self, event_embeddings, emotion_embeddings):</text:p>
      <text:p text:style-name="Preformatted_20_Text"><text:s text:c="8"/># Генератор: создает связи событие→эмоция</text:p>
      <text:p text:style-name="Preformatted_20_Text"><text:s text:c="8"/># Дискриминатор: оценивает качество связей</text:p>
      <text:p text:style-name="P1"><text:s text:c="8"/># Результат: новые паттерны эмоциональных реакций</text:p>
      <text:h text:style-name="Heading_20_3" text:outline-level="3">4.3. Эволюция через GA</text:h>
      <text:p text:style-name="Text_20_body">python</text:p>
      <text:p text:style-name="Preformatted_20_Text">class EmotionEvolution:</text:p>
      <text:p text:style-name="Preformatted_20_Text"><text:s text:c="4"/>def evolve(self):</text:p>
      <text:p text:style-name="Preformatted_20_Text"><text:s text:c="8"/># Популяция: наборы эмоциональных реакций</text:p>
      <text:p text:style-name="Preformatted_20_Text"><text:s text:c="8"/># Фитнес: эффективность реакций</text:p>
      <text:p text:style-name="P1"><text:s text:c="8"/># Результат: оптимальные эмоциональные паттерны</text:p>
      <text:p text:style-name="Horizontal_20_Line"/>
      <text:h text:style-name="Heading_20_2" text:outline-level="2">5. ВЫВОД</text:h>
      <text:h text:style-name="Heading_20_3" text:outline-level="3">Сейчас (тест):</text:h>
      <text:p text:style-name="Text_20_body">text</text:p>
      <text:p text:style-name="P1">Сенсоры → Эмбеддинг (128-dim) → Поиск в биграфе → Эмоция</text:p>
      <text:h text:style-name="Heading_20_3" text:outline-level="3">Планируется (полная версия):</text:h>
      <text:p text:style-name="Text_20_body">text</text:p>
      <text:p text:style-name="Preformatted_20_Text">Сенсоры → Эмбеддинг (128-dim) → GAN (генерация) + GA (эволюция) → Эмоция</text:p>
      <text:p text:style-name="Preformatted_20_Text"><text:s text:c="36"/>│</text:p>
      <text:p text:style-name="Preformatted_20_Text"><text:s text:c="36"/>▼</text:p>
      <text:p text:style-name="Preformatted_20_Text"><text:s text:c="30"/>Биграф событий/эмоций</text:p>
      <text:p text:style-name="Preformatted_20_Text"><text:s text:c="36"/>│</text:p>
      <text:p text:style-name="Preformatted_20_Text"><text:s text:c="36"/>▼</text:p>
      <text:p text:style-name="P1"><text:s text:c="30"/>Интеграция с инстинктами/рефлексами</text:p>
      <text:p text:style-name="Text_20_body">Хотите, чтобы я помог реализовать <text:span text:style-name="Strong_20_Emphasis">GAN для эмоций</text:span> или <text:span text:style-name="Strong_20_Emphasis">эволюцию эмоциональных реакций</text:span>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9T08:34:32.688421297</meta:creation-date>
    <dc:date>2026-07-09T08:36:19.597054419</dc:date>
    <meta:editing-duration>PT1M47S</meta:editing-duration>
    <meta:editing-cycles>1</meta:editing-cycles>
    <meta:document-statistic meta:table-count="1" meta:image-count="0" meta:object-count="0" meta:page-count="5" meta:paragraph-count="241" meta:word-count="850" meta:character-count="8714" meta:non-whitespace-character-count="6507"/>
    <meta:generator>LibreOffice/7.3.7.2$Linux_X86_64 LibreOffice_project/30$Build-2</meta:generator>
  </office:meta>
</office:document-meta>
</file>